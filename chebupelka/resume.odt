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>
      <style:paragraph-properties fo:margin-top="0in" fo:margin-bottom="0in" loext:contextual-spacing="false"/>
    </style:style>
    <style:style style:name="P18" style:family="paragraph" style:parent-style-name="Text_20_body">
      <style:paragraph-properties fo:margin-left="0.3937in" fo:margin-right="0.3937in" fo:text-indent="0in" style:auto-text-indent="false"/>
      <style:text-properties fo:font-style="italic"/>
    </style:style>
    <style:style style:name="T1" style:family="text">
      <style:text-properties fo:font-style="itali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Этот код — отличный пример <text:span text:style-name="Strong_20_Emphasis">минималистичного, но полностью функционального ИИ-агента</text:span>, работающего по паттерну ReAct (Reasoning and Acting). Он использует формат вызова функций (Tool Calling/Function Calling), совместимый с OpenAI API, что делает его универсальным.</text:p>
      <text:p text:style-name="Text_20_body">Ниже я подробно разберу, как он работает, почему он написан хорошо, и предложу ряд критических и архитектурных улучшений.</text:p>
      <text:p text:style-name="Horizontal_20_Line"/>
      <text:h text:style-name="Heading_20_3" text:outline-level="3">🧐 Подробный разбор (комментарий к коду)</text:h>
      <text:h text:style-name="Heading_20_4" text:outline-level="4">1. Настройки и константы</text:h>
      <text:p text:style-name="Text_20_body">Вы используете локальный сервер (вероятно, llama.cpp сервер), который предоставляет API, совместимое с OpenAI. Модель Qwen 2.5/3 (судя по Qwen3.6-27B — возможно, опечатка, и это Qwen 2.5 27B) отлично справляется с программированием и вызовом функций. Защита от бесконечного цикла MAX_TURNS = 1000 — хорошая практика.</text:p>
      <text:h text:style-name="Heading_20_4" text:outline-level="4">2. Системный промпт (SYSTEM_PROMPT)</text:h>
      <text:p text:style-name="Text_20_body">Очень грамотный промпт. Вы четко описываете:</text:p>
      <text:list xml:id="list232453864" text:style-name="L1">
        <text:list-item>
          <text:p text:style-name="P3">Роль (coding agent).</text:p>
        </text:list-item>
        <text:list-item>
          <text:p text:style-name="P3">Инструментарий (только bash).</text:p>
        </text:list-item>
        <text:list-item>
          <text:p text:style-name="P3">Workflow (планирование -&gt; действие -&gt; ответ).</text:p>
        </text:list-item>
        <text:list-item>
          <text:p text:style-name="P3">Формат завершения (ответ обычным текстом без вызова тулзов).</text:p>
        </text:list-item>
      </text:list>
      <text:h text:style-name="Heading_20_4" text:outline-level="4">3. Инструменты (LLM_TOOLS и функции)</text:h>
      <text:list xml:id="list3402587419" text:style-name="L2">
        <text:list-item>
          <text:p text:style-name="P4">Функция run_bash использует subprocess.run(shell=True). Она правильно объединяет stdout и stderr, а также добавляет код возврата (Exit code). Это супер-важно для ИИ, чтобы он понимал, успешно ли выполнилась команда (например, если нет команды make, он увидит код 127).</text:p>
        </text:list-item>
        <text:list-item>
          <text:p text:style-name="P4">Добавлен timeout=120, что спасает агента от зависания (например, если он запустит nano или сервер без демонизации).</text:p>
        </text:list-item>
      </text:list>
      <text:h text:style-name="Heading_20_4" text:outline-level="4">4. Цикл агента (agent_loop)</text:h>
      <text:p text:style-name="Text_20_body">Это классический цикл:</text:p>
      <text:list xml:id="list3931601310" text:style-name="L3">
        <text:list-item>
          <text:p text:style-name="P5">Запрос к LLM.</text:p>
        </text:list-item>
        <text:list-item>
          <text:p text:style-name="P5">Если есть текст — печатаем (полезно для понимания мыслей ИИ, так называемый <text:span text:style-name="T1">Chain of Thought</text:span>).</text:p>
        </text:list-item>
        <text:list-item>
          <text:p text:style-name="P5">Если нет вызова инструментов — значит, задача решена, выходим (break/return).</text:p>
        </text:list-item>
        <text:list-item>
          <text:p text:style-name="P5">Если инструменты есть — выполняем их, добавляем результаты в историю (messages) и идем на следующий круг.</text:p>
        </text:list-item>
      </text:list>
      <text:p text:style-name="Horizontal_20_Line"/>
      <text:h text:style-name="Heading_20_3" text:outline-level="3"><text:soft-page-break/>🛠️ Что можно и нужно улучшить</text:h>
      <text:p text:style-name="Text_20_body">Код рабочий, но в нем есть один небольшой баг и несколько ограничений, характерных для bash-агентов.</text:p>
      <text:h text:style-name="Heading_20_4" text:outline-level="4">1. КРИТИЧЕСКИЙ БАГ: Добавление сообщений в историю при нескольких Tool Calls</text:h>
      <text:p text:style-name="Text_20_body">В текущей реализации в цикле for tool_call in tool_calls: вы добавляете сообщение assistant в список messages <text:span text:style-name="Strong_20_Emphasis">для каждого</text:span> вызова инструмента. Если LLM вернет сразу два вызова bash в одном ответе, структура messages сломается (будет дублироваться сообщение ассистента).</text:p>
      <text:p text:style-name="Text_20_body"><text:span text:style-name="Strong_20_Emphasis">Как исправить:</text:span><text:line-break/>Сообщение ассистента со всеми tool_calls должно добавляться <text:span text:style-name="Strong_20_Emphasis">один раз</text:span> до цикла, а результаты — внутри цикла.</text:p>
      <text:p text:style-name="P17">code Python</text:p>
      <text:section text:style-name="Sect1" text:name="cdk-accordion-child-2">
        <text:p text:style-name="Preformatted_20_Text"><text:span text:style-name="Source_20_Text"># ИСПРАВЛЕННЫЙ БЛОК В agent_loop:</text:span></text:p>
        <text:p text:style-name="Preformatted_20_Text"><text:span text:style-name="Source_20_Text"><text:s text:c="8"/>prefix = "\n" if content else ""</text:span></text:p>
        <text:p text:style-name="Preformatted_20_Text"><text:span text:style-name="Source_20_Text"><text:s text:c="8"/></text:span></text:p>
        <text:p text:style-name="Preformatted_20_Text"><text:span text:style-name="Source_20_Text"><text:s text:c="8"/># 1. Добавляем ответ ассистента ОДИН РАЗ (даже если он пустой, но с tool_calls)</text:span></text:p>
        <text:p text:style-name="Preformatted_20_Text"><text:span text:style-name="Source_20_Text"><text:s text:c="8"/>messages.append({</text:span></text:p>
        <text:p text:style-name="Preformatted_20_Text"><text:span text:style-name="Source_20_Text"><text:s text:c="12"/>"role": "assistant",</text:span></text:p>
        <text:p text:style-name="Preformatted_20_Text"><text:span text:style-name="Source_20_Text"><text:s text:c="12"/>"content": content or None,</text:span></text:p>
        <text:p text:style-name="Preformatted_20_Text"><text:span text:style-name="Source_20_Text"><text:s text:c="12"/>"tool_calls": tool_calls</text:span></text:p>
        <text:p text:style-name="Preformatted_20_Text"><text:span text:style-name="Source_20_Text"><text:s text:c="8"/>})</text:span></text:p>
        <text:p text:style-name="Preformatted_20_Text"/>
        <text:p text:style-name="Preformatted_20_Text"><text:span text:style-name="Source_20_Text"><text:s text:c="8"/># 2. Выполняем инструменты и добавляем их результаты</text:span></text:p>
        <text:p text:style-name="Preformatted_20_Text"><text:span text:style-name="Source_20_Text"><text:s text:c="8"/>for tool_call in tool_calls:</text:span></text:p>
        <text:p text:style-name="Preformatted_20_Text"><text:span text:style-name="Source_20_Text"><text:s text:c="12"/>function = tool_call["function"]["name"]</text:span></text:p>
        <text:p text:style-name="Preformatted_20_Text"><text:span text:style-name="Source_20_Text"><text:s text:c="12"/>arguments = json.loads(tool_call["function"]["arguments"])</text:span></text:p>
        <text:p text:style-name="Preformatted_20_Text"><text:span text:style-name="Source_20_Text"><text:s text:c="12"/>tool_call_id = tool_call["id"]</text:span></text:p>
        <text:p text:style-name="Preformatted_20_Text"><text:span text:style-name="Source_20_Text"><text:s text:c="12"/></text:span></text:p>
        <text:p text:style-name="Preformatted_20_Text"><text:span text:style-name="Source_20_Text"><text:s text:c="12"/>print(f"{prefix}🔧 Tool: {function}({json.dumps(arguments, ensure_ascii=False)})")</text:span></text:p>
        <text:p text:style-name="Preformatted_20_Text"><text:span text:style-name="Source_20_Text"><text:s text:c="12"/>result = call_tool(function, arguments)</text:span></text:p>
        <text:p text:style-name="Preformatted_20_Text"><text:span text:style-name="Source_20_Text"><text:s text:c="12"/>print(f" <text:s text:c="2"/>→ {result[:500]}{'...' if len(result)&gt;500 else ''}")</text:span></text:p>
        <text:p text:style-name="Preformatted_20_Text"><text:span text:style-name="Source_20_Text"><text:s text:c="12"/></text:span></text:p>
        <text:p text:style-name="Preformatted_20_Text"><text:span text:style-name="Source_20_Text"><text:s text:c="12"/># Добавляем результат работы тулза</text:span></text:p>
        <text:p text:style-name="Preformatted_20_Text"><text:span text:style-name="Source_20_Text"><text:s text:c="12"/>messages.append({</text:span></text:p>
        <text:p text:style-name="Preformatted_20_Text"><text:span text:style-name="Source_20_Text"><text:s text:c="16"/>"role": "tool",</text:span></text:p>
        <text:p text:style-name="Preformatted_20_Text"><text:span text:style-name="Source_20_Text"><text:s text:c="16"/>"tool_call_id": tool_call_id,</text:span></text:p>
        <text:p text:style-name="Preformatted_20_Text"><text:span text:style-name="Source_20_Text"><text:s text:c="16"/>"content": result</text:span></text:p>
        <text:p text:style-name="P1"><text:span text:style-name="Source_20_Text"><text:s text:c="12"/>})</text:span></text:p>
      </text:section>
      <text:h text:style-name="Heading_20_4" text:outline-level="4">2. Проблема потери состояния (Statefulness)</text:h>
      <text:p text:style-name="Text_20_body">Вы используете subprocess.run(...). Каждый вызов bash — это <text:span text:style-name="Strong_20_Emphasis">новый изолированный процесс</text:span>.<text:line-break/>Если агент сделает:</text:p>
      <text:list xml:id="list2102307673" text:style-name="L4">
        <text:list-item>
          <text:p text:style-name="P6">Вызов 1: command="cd /tmp"</text:p>
        </text:list-item>
        <text:list-item>
          <text:p text:style-name="P6">Вызов 2: command="ls"</text:p>
        </text:list-item>
      </text:list>
      <text:p text:style-name="Text_20_body">Агент не увидит содержимое /tmp, он увидит содержимое текущей директории, потому что cd сработало в первом процессе, который тут же завершился.</text:p>
      <text:p text:style-name="Text_20_body"><text:span text:style-name="Strong_20_Emphasis">Как исправить (2 варианта):</text:span></text:p>
      <text:list xml:id="list1160741432" text:style-name="L5">
        <text:list-item>
          <text:p text:style-name="P7"><text:soft-page-break/><text:span text:style-name="Strong_20_Emphasis">Простой вариант:</text:span> Дописать в SYSTEM_PROMPT предупреждение: <text:span text:style-name="T1">"Every bash command runs in a new session. You cannot change directories between commands. Use absolute paths or chain commands like cd /tmp &amp;&amp; ls"</text:span>.</text:p>
        </text:list-item>
        <text:list-item>
          <text:p text:style-name="P7"><text:span text:style-name="Strong_20_Emphasis">Сложный вариант:</text:span> Использовать постоянный процесс (например, через библиотеку pexpect или Jupyter/IPython kernel), но это сильно усложнит ваш красивый минималистичный код. Я рекомендую первый вариант.</text:p>
        </text:list-item>
      </text:list>
      <text:h text:style-name="Heading_20_4" text:outline-level="4">3. Переполнение контекстного окна (Context Blowout)</text:h>
      <text:p text:style-name="Text_20_body">Вы обрезаете вывод в консоль для пользователя: result[:500], <text:span text:style-name="Strong_20_Emphasis">но в messages для LLM вы отправляете полный result</text:span>.<text:line-break/>Если ИИ выполнит команду cat large_log.txt на 10 мегабайт, API упадет с ошибкой context length exceeded.</text:p>
      <text:p text:style-name="Text_20_body"><text:span text:style-name="Strong_20_Emphasis">Как исправить:</text:span><text:line-break/>Обрезайте текст перед добавлением в историю.</text:p>
      <text:p text:style-name="P17">code Python</text:p>
      <text:section text:style-name="Sect1" text:name="cdk-accordion-child-3">
        <text:p text:style-name="Preformatted_20_Text"><text:span text:style-name="Source_20_Text">def run_bash(command: str) -&gt; str:</text:span></text:p>
        <text:p text:style-name="Preformatted_20_Text"><text:span text:style-name="Source_20_Text"><text:s text:c="4"/>try:</text:span></text:p>
        <text:p text:style-name="Preformatted_20_Text"><text:span text:style-name="Source_20_Text"><text:s text:c="8"/>command_result = subprocess.run(command, shell=True, capture_output=True, text=True, timeout=120)</text:span></text:p>
        <text:p text:style-name="Preformatted_20_Text"><text:span text:style-name="Source_20_Text"><text:s text:c="8"/>out = command_result.stdout + (f"\nSTDERR:\n{command_result.stderr}" if command_result.stderr else "")</text:span></text:p>
        <text:p text:style-name="Preformatted_20_Text"><text:span text:style-name="Source_20_Text"><text:s text:c="8"/>full_output = f"Exit code: {command_result.returncode}\n{out}"</text:span></text:p>
        <text:p text:style-name="Preformatted_20_Text"><text:span text:style-name="Source_20_Text"><text:s text:c="8"/></text:span></text:p>
        <text:p text:style-name="Preformatted_20_Text"><text:span text:style-name="Source_20_Text"><text:s text:c="8"/># Обрезаем до ~8000 символов, чтобы не убить контекст LLM</text:span></text:p>
        <text:p text:style-name="Preformatted_20_Text"><text:span text:style-name="Source_20_Text"><text:s text:c="8"/>if len(full_output) &gt; 8000:</text:span></text:p>
        <text:p text:style-name="Preformatted_20_Text"><text:span text:style-name="Source_20_Text"><text:s text:c="12"/>return full_output[:8000] + "\n...[OUTPUT TRUNCATED]..."</text:span></text:p>
        <text:p text:style-name="Preformatted_20_Text"><text:span text:style-name="Source_20_Text"><text:s text:c="8"/>return full_output</text:span></text:p>
        <text:p text:style-name="Preformatted_20_Text"><text:span text:style-name="Source_20_Text"><text:s text:c="4"/>except subprocess.TimeoutExpired:</text:span></text:p>
        <text:p text:style-name="P1"><text:span text:style-name="Source_20_Text"><text:s text:c="8"/>return "Error: command timed out after 120s"</text:span></text:p>
      </text:section>
      <text:h text:style-name="Heading_20_4" text:outline-level="4">4. Безопасность (Security)</text:h>
      <text:p text:style-name="Text_20_body">Агент запускает shell=True на вашей хост-машине. Если вы попросите его: <text:span text:style-name="T1">"Очисти место на диске"</text:span>, он может случайно сделать rm -rf / или удалить ваши личные файлы.<text:line-break/><text:span text:style-name="Strong_20_Emphasis">Совет:</text:span> В идеале запускать этот скрипт внутри Docker-контейнера или хотя бы в пустой виртуальной машине.</text:p>
      <text:h text:style-name="Heading_20_4" text:outline-level="4">5. Мелкие улучшения стабильности</text:h>
      <text:p text:style-name="Text_20_body">Иногда LLM генерирует плохой JSON в аргументах функции (особенно при экранировании кавычек в сложных bash-скриптах).<text:line-break/>Стоит добавить try-except на парсинг JSON в agent_loop:</text:p>
      <text:p text:style-name="P17">code Python</text:p>
      <text:section text:style-name="Sect1" text:name="cdk-accordion-child-4">
        <text:p text:style-name="Preformatted_20_Text"><text:span text:style-name="Source_20_Text">try:</text:span></text:p>
        <text:p text:style-name="Preformatted_20_Text"><text:span text:style-name="Source_20_Text"><text:s text:c="16"/>arguments = json.loads(tool_call["function"]["arguments"])</text:span></text:p>
        <text:p text:style-name="Preformatted_20_Text"><text:span text:style-name="Source_20_Text"><text:s text:c="12"/>except json.JSONDecodeError:</text:span></text:p>
        <text:p text:style-name="Preformatted_20_Text"><text:span text:style-name="Source_20_Text"><text:s text:c="16"/>arguments = {}</text:span></text:p>
        <text:p text:style-name="Preformatted_20_Text"><text:span text:style-name="Source_20_Text"><text:s text:c="16"/>result = "Error: Invalid JSON arguments provided by LLM."</text:span></text:p>
        <text:p text:style-name="P1"><text:span text:style-name="Source_20_Text"><text:s text:c="16"/># ... добавить результат в messages и пойти дальше</text:span></text:p>
      </text:section>
      <text:h text:style-name="Heading_20_3" text:outline-level="3"><text:soft-page-break/>Итоговое резюме</text:h>
      <text:p text:style-name="Text_20_body">Код отличный, он демонстрирует глубокое понимание того, как работают LLM-агенты "под капотом". Если вы исправите баг с добавлением tool_calls в историю, обрежете длину вывода bash (чтобы не забить контекст) и учтете, что cd не сохраняется между вызовами — у вас получится очень мощный и стабильный инструмент для автоматизации локальных задач.</text:p>
      <text:p text:style-name="Text_20_body"/>
      <text:p text:style-name="Text_20_body">То есть вот это tool_calls = msg.get("tool_calls"), получение описания вызова аргументов в ответе - это есть какой-то стандартный протокол?</text:p>
      <text:p text:style-name="Text_20_body"><text:span text:style-name="Strong_20_Emphasis">Да, абсолютно верно!</text:span> Это де-факто <text:span text:style-name="Strong_20_Emphasis">мировой стандарт</text:span> в мире LLM, который называется <text:span text:style-name="Strong_20_Emphasis">OpenAI Tool Calling Protocol</text:span> (или ранее <text:span text:style-name="T1">Function Calling</text:span>).</text:p>
      <text:p text:style-name="Text_20_body">Хотя вы используете локальную модель (через llama.cpp и Qwen), ваш сервер предоставляет так называемый <text:span text:style-name="Strong_20_Emphasis">OpenAI-Compatible API</text:span>. Это значит, что он имитирует то, как работает оригинальный ChatGPT.</text:p>
      <text:p text:style-name="Text_20_body">Давайте я коротко расскажу, как появился этот стандарт и как именно устроен этот протокол. Вы сразу поймете, почему ваш код написан именно так.</text:p>
      <text:p text:style-name="Horizontal_20_Line"/>
      <text:h text:style-name="Heading_20_3" text:outline-level="3">Эволюция: Как мы к этому пришли</text:h>
      <text:p text:style-name="Text_20_body"><text:span text:style-name="Strong_20_Emphasis">До лета 2023 года</text:span> агентов писали через «костыли». В системный промпт писали:</text:p>
      <text:p text:style-name="P18">"Если хочешь выполнить команду, ответь строгим JSON в формате {"action": "bash", "cmd": "ls"} и больше ничего не пиши!"</text:p>
      <text:p text:style-name="Text_20_body">LLM часто ошибались: добавляли лишний текст (типа "Конечно, вот ваш JSON:"), забывали закрывать скобки и т.д. Парсить это было болью.</text:p>
      <text:p text:style-name="Text_20_body"><text:span text:style-name="Strong_20_Emphasis">Летом 2023 года</text:span> OpenAI выпустила обновление (Function Calling). Они <text:span text:style-name="Strong_20_Emphasis">на уровне архитектуры и датасетов</text:span> обучили свои модели понимать, когда нужно обратиться к внешнему инструменту, и генерировать идеальный, стандартизированный JSON-ответ.</text:p>
      <text:p text:style-name="Text_20_body">Вскоре этот протокол скопировали <text:span text:style-name="Strong_20_Emphasis">все</text:span>: Anthropic (Claude), Google (Gemini), Mistral, а также создатели опенсорсных серверов вроде llama.cpp, vLLM и Ollama.</text:p>
      <text:p text:style-name="Horizontal_20_Line"/>
      <text:h text:style-name="Heading_20_3" text:outline-level="3">Как устроен этот стандартный протокол (3 шага)</text:h>
      <text:p text:style-name="Text_20_body">Протокол состоит из трех жестко регламентированных частей:</text:p>
      <text:h text:style-name="Heading_20_4" text:outline-level="4">Шаг 1. Описание (Tools Schema) — <text:span text:style-name="T1">То, что вы отправляете LLM</text:span></text:h>
      <text:p text:style-name="Text_20_body">Вы должны описать инструменты в формате <text:a xlink:type="simple" xlink:href="https://www.google.com/url?sa=E&amp;q=https%3A%2F%2Fjson-schema.org%2F" office:target-frame-name="_blank" xlink:show="new" text:style-name="Internet_20_link" text:visited-style-name="Visited_20_Internet_20_Link">JSON Schema</text:a>.<text:line-break/>Именно это делает ваша переменная LLM_TOOLS. Вы говорите модели: «У тебя есть инструмент типа function, вот его имя, описание и строгое описание аргументов». Модель анализирует это перед тем, как ответить.</text:p>
      <text:h text:style-name="Heading_20_4" text:outline-level="4"><text:soft-page-break/>Шаг 2. Вызов (Tool Call) — <text:span text:style-name="T1">То, о чем вы спросили</text:span></text:h>
      <text:p text:style-name="Text_20_body">Если модель решает, что для ответа пользователю нужно вызвать функцию, она <text:span text:style-name="Strong_20_Emphasis">не пишет текст</text:span>, а возвращает специальный объект в ответе.<text:line-break/>Ваш код msg.get("tool_calls") извлекает вот такой стандартизированный массив (список):</text:p>
      <text:p text:style-name="P17">code JSON</text:p>
      <text:section text:style-name="Sect1" text:name="cdk-accordion-child-8">
        <text:p text:style-name="Preformatted_20_Text"><text:span text:style-name="Source_20_Text">"tool_calls": [</text:span></text:p>
        <text:p text:style-name="Preformatted_20_Text"><text:span text:style-name="Source_20_Text"><text:s text:c="2"/>{</text:span></text:p>
        <text:p text:style-name="Preformatted_20_Text"><text:span text:style-name="Source_20_Text"><text:s text:c="4"/>"id": "call_abc123xyz", </text:span></text:p>
        <text:p text:style-name="Preformatted_20_Text"><text:span text:style-name="Source_20_Text"><text:s text:c="4"/>"type": "function",</text:span></text:p>
        <text:p text:style-name="Preformatted_20_Text"><text:span text:style-name="Source_20_Text"><text:s text:c="4"/>"function": {</text:span></text:p>
        <text:p text:style-name="Preformatted_20_Text"><text:span text:style-name="Source_20_Text"><text:s text:c="6"/>"name": "bash",</text:span></text:p>
        <text:p text:style-name="Preformatted_20_Text"><text:span text:style-name="Source_20_Text"><text:s text:c="6"/>"arguments": "{\"command\": \"ls -la\"}" </text:span></text:p>
        <text:p text:style-name="Preformatted_20_Text"><text:span text:style-name="Source_20_Text"><text:s text:c="4"/>}</text:span></text:p>
        <text:p text:style-name="Preformatted_20_Text"><text:span text:style-name="Source_20_Text"><text:s text:c="2"/>}</text:span></text:p>
        <text:p text:style-name="P1"><text:span text:style-name="Source_20_Text">]</text:span></text:p>
      </text:section>
      <text:p text:style-name="Text_20_body"><text:span text:style-name="Strong_20_Emphasis">Важные фишки стандарта здесь:</text:span></text:p>
      <text:list xml:id="list2728004973" text:style-name="L6">
        <text:list-item>
          <text:p text:style-name="P8"><text:span text:style-name="Strong_20_Emphasis">Массив:</text:span> Это список ([]), потому что современные модели умеют вызывать несколько функций параллельно (Parallel Tool Calling). Например: <text:span text:style-name="T1">"Узнай погоду в Москве и в Питере одновременно"</text:span>.</text:p>
        </text:list-item>
        <text:list-item>
          <text:p text:style-name="P8"><text:span text:style-name="Strong_20_Emphasis">Уникальный ID (call_abc123xyz):</text:span> Он нужен, чтобы потом связать результат с конкретным запросом.</text:p>
        </text:list-item>
        <text:list-item>
          <text:p text:style-name="P8"><text:span text:style-name="Strong_20_Emphasis">arguments это строка (String), а не JSON-объект:</text:span> Это сделано специально. Когда LLM генерирует ответ посимвольно (Streaming), API склеивает эту строку, чтобы разработчик мог попробовать спарсить JSON даже до того, как модель закончит ответ. Вот почему в вашем коде вы делаете json.loads(tool_call["function"]["arguments"]).</text:p>
        </text:list-item>
      </text:list>
      <text:h text:style-name="Heading_20_4" text:outline-level="4">Шаг 3. Возврат результата (Tool Role)</text:h>
      <text:p text:style-name="Text_20_body">Когда вы выполнили команду в Python, вы должны вернуть результат обратно в модель, чтобы она продолжила думать.<text:line-break/>Стандарт требует, чтобы вы отправили <text:span text:style-name="Strong_20_Emphasis">два</text:span> сообщения:</text:p>
      <text:list xml:id="list2858119947" text:style-name="L7">
        <text:list-item>
          <text:p text:style-name="P9">Сообщение от ассистента с тем самым tool_calls, которое он просил (чтобы модель помнила, что она вообще просила сделать).</text:p>
        </text:list-item>
        <text:list-item>
          <text:p text:style-name="P9">Новое сообщение с ролью role: "tool", где вы указываете тот самый tool_call_id и результат (stdout вашей команды).</text:p>
        </text:list-item>
      </text:list>
      <text:p text:style-name="Text_20_body">В вашем коде это реализовано идеально:</text:p>
      <text:p text:style-name="P17"/>
      <text:section text:style-name="Sect1" text:name="cdk-accordion-child-9">
        <text:p text:style-name="Preformatted_20_Text"><text:span text:style-name="Source_20_Text">messages.append({"role": "assistant", "content": content or None, "tool_calls": [tool_call]})</text:span></text:p>
        <text:p text:style-name="P1"><text:span text:style-name="Source_20_Text">messages.append({"role": "tool", "tool_call_id": tool_call_id, "content": result})</text:span></text:p>
      </text:section>
      <text:p text:style-name="Horizontal_20_Line"/>
      <text:h text:style-name="Heading_20_3" text:outline-level="3">Почему круто, что ваш код использует этот стандарт?</text:h>
      <text:p text:style-name="Text_20_body">Потому что ваш код <text:span text:style-name="Strong_20_Emphasis">абсолютно независим от провайдера</text:span>.<text:line-break/><text:soft-page-break/>Если завтра вы захотите заменить локальную Qwen на GPT-4o, Claude 3.5 Sonnet (через прокси) или Llama 3, вам нужно будет поменять <text:span text:style-name="Strong_20_Emphasis">только URL и API-ключ</text:span> (LLM_BASE_URL и LLM_API_KEY). Вся логика агента, парсинг ответов и вызовы инструментов продолжат работать безупречно, так как вся индустрия договорилась использовать этот протокол от OpenAI!</text:p>
      <text:p text:style-name="Text_20_body">Вы абсолютно правы, и вы поймали меня на противоречии в формулировках! Спасибо, что обратили на это внимание.</text:p>
      <text:p text:style-name="Text_20_body">Я смешал два понятия: <text:span text:style-name="Strong_20_Emphasis">синтаксис</text:span> (формат словарей) и <text:span text:style-name="Strong_20_Emphasis">логику цикла</text:span> (место, где этот код выполняется).</text:p>
      <text:p text:style-name="Text_20_body">Давайте распутаем это противоречие.</text:p>
      <text:h text:style-name="Heading_20_3" text:outline-level="3">Что было "идеально" (Синтаксис)</text:h>
      <text:p text:style-name="Text_20_body">Сами словари, которые вы собираете:</text:p>
      <text:p text:style-name="P17">code Python</text:p>
      <text:section text:style-name="Sect1" text:name="cdk-accordion-child-15">
        <text:p text:style-name="Preformatted_20_Text"><text:span text:style-name="Source_20_Text">{"role": "assistant", "content": content or None, "tool_calls": ...}</text:span></text:p>
        <text:p text:style-name="P1"><text:span text:style-name="Source_20_Text">{"role": "tool", "tool_call_id": tool_call_id, "content": result}</text:span></text:p>
      </text:section>
      <text:p text:style-name="Text_20_body">Они написаны <text:span text:style-name="Strong_20_Emphasis">идеально по стандарту</text:span>. Вы используете правильные роли (assistant, tool), правильно передаете массив вызовов и правильно связываете ответ через tool_call_id. К самим строчкам кода претензий нет.</text:p>
      <text:h text:style-name="Heading_20_3" text:outline-level="3">В чем заключался баг (Логика)</text:h>
      <text:p text:style-name="Text_20_body">Проблема кроется <text:span text:style-name="Strong_20_Emphasis">в том, где именно</text:span> эти идеальные строчки расположены в вашем коде. У вас они находятся <text:span text:style-name="Strong_20_Emphasis">внутри цикла for</text:span>.</text:p>
      <text:p text:style-name="Text_20_body">Представьте, что модель решила выполнить сразу две команды в одном ответе (Parallel Tool Calling). В переменной msg.get("tool_calls") придет массив из <text:span text:style-name="Strong_20_Emphasis">двух</text:span> элементов.</text:p>
      <text:p text:style-name="Text_20_body">Вот что сделает ваш оригинальный код:</text:p>
      <text:list xml:id="list3044968660" text:style-name="L8">
        <text:list-item>
          <text:p text:style-name="P10">Зайдет в цикл (1-й инструмент).</text:p>
        </text:list-item>
        <text:list-item>
          <text:p text:style-name="P10">Выполнит bash.</text:p>
        </text:list-item>
        <text:list-item>
          <text:p text:style-name="P10">Добавит в историю сообщение assistant с одним тулзом.</text:p>
        </text:list-item>
        <text:list-item>
          <text:p text:style-name="P10">Добавит в историю сообщение tool с результатом первого bash.</text:p>
        </text:list-item>
        <text:list-item>
          <text:p text:style-name="P10">Пойдет на второй круг цикла (2-й инструмент).</text:p>
        </text:list-item>
        <text:list-item>
          <text:p text:style-name="P10">Выполнит bash.</text:p>
        </text:list-item>
        <text:list-item>
          <text:p text:style-name="P10"><text:span text:style-name="Strong_20_Emphasis">Снова добавит в историю сообщение assistant!</text:span></text:p>
        </text:list-item>
        <text:list-item>
          <text:p text:style-name="P10">Добавит в историю сообщение tool.</text:p>
        </text:list-item>
      </text:list>
      <text:p text:style-name="Text_20_body">История сообщений (messages), которая уйдет на сервер в следующем запросе, будет выглядеть так:</text:p>
      <text:list xml:id="list707143841" text:style-name="L9">
        <text:list-item>
          <text:p text:style-name="P11">user: Помоги.</text:p>
        </text:list-item>
        <text:list-item>
          <text:p text:style-name="P11"><text:soft-page-break/>assistant: [хочу вызвать bash 1] <text:span text:style-name="T1">(добавлено на 1 круге цикла)</text:span></text:p>
        </text:list-item>
        <text:list-item>
          <text:p text:style-name="P11">tool: [результат bash 1]</text:p>
        </text:list-item>
        <text:list-item>
          <text:p text:style-name="P11"><text:span text:style-name="Strong_20_Emphasis">assistant: [хочу вызвать bash 2]</text:span> <text:span text:style-name="T1">(ошибка стандарта!)</text:span></text:p>
        </text:list-item>
        <text:list-item>
          <text:p text:style-name="P11">tool: [результат bash 2]</text:p>
        </text:list-item>
      </text:list>
      <text:p text:style-name="Text_20_body"><text:span text:style-name="Strong_20_Emphasis">Сервер API вернет ошибку HTTP 400 (Bad Request).</text:span><text:line-break/>Стандарт требует, чтобы история выглядела так:</text:p>
      <text:list xml:id="list2209294626" text:style-name="L10">
        <text:list-item>
          <text:p text:style-name="P12">user: Помоги.</text:p>
        </text:list-item>
        <text:list-item>
          <text:p text:style-name="P12">assistant: [хочу вызвать bash 1, хочу вызвать bash 2] <text:span text:style-name="T1">(добавляется ОДИН раз)</text:span></text:p>
        </text:list-item>
        <text:list-item>
          <text:p text:style-name="P12">tool: [результат bash 1]</text:p>
        </text:list-item>
        <text:list-item>
          <text:p text:style-name="P12">tool: [результат bash 2]</text:p>
        </text:list-item>
      </text:list>
      <text:h text:style-name="Heading_20_3" text:outline-level="3">Как это должно выглядеть в коде, чтобы быть идеальным на 100%</text:h>
      <text:p text:style-name="Text_20_body">Чтобы синтаксис стандарта не ломался логикой цикла, добавление роли assistant нужно вынести <text:span text:style-name="Strong_20_Emphasis">до цикла</text:span>, а добавление роли tool оставить <text:span text:style-name="Strong_20_Emphasis">внутри цикла</text:span>:</text:p>
      <text:p text:style-name="P17">code Python</text:p>
      <text:section text:style-name="Sect1" text:name="cdk-accordion-child-16">
        <text:p text:style-name="Preformatted_20_Text"><text:span text:style-name="Source_20_Text"># 1. Добавляем сообщение ассистента со всеми тулзами СРАЗУ (ОДИН РАЗ ДО ЦИКЛА)</text:span></text:p>
        <text:p text:style-name="Preformatted_20_Text"><text:span text:style-name="Source_20_Text"># Это стандартный протокол: одно сообщение ассистента содержит массив из 1 или более tool_calls</text:span></text:p>
        <text:p text:style-name="Preformatted_20_Text"><text:span text:style-name="Source_20_Text">messages.append({</text:span></text:p>
        <text:p text:style-name="Preformatted_20_Text"><text:span text:style-name="Source_20_Text"><text:s text:c="4"/>"role": "assistant", </text:span></text:p>
        <text:p text:style-name="Preformatted_20_Text"><text:span text:style-name="Source_20_Text"><text:s text:c="4"/>"content": content or None, </text:span></text:p>
        <text:p text:style-name="Preformatted_20_Text"><text:span text:style-name="Source_20_Text"><text:s text:c="4"/>"tool_calls": tool_calls # передаем весь массив целиком!</text:span></text:p>
        <text:p text:style-name="Preformatted_20_Text"><text:span text:style-name="Source_20_Text">})</text:span></text:p>
        <text:p text:style-name="Preformatted_20_Text"/>
        <text:p text:style-name="Preformatted_20_Text"><text:span text:style-name="Source_20_Text"># 2. Выполняем инструменты в цикле и отправляем результаты</text:span></text:p>
        <text:p text:style-name="Preformatted_20_Text"><text:span text:style-name="Source_20_Text">for tool_call in tool_calls:</text:span></text:p>
        <text:p text:style-name="Preformatted_20_Text"><text:span text:style-name="Source_20_Text"><text:s text:c="4"/>function = tool_call["function"]["name"]</text:span></text:p>
        <text:p text:style-name="Preformatted_20_Text"><text:span text:style-name="Source_20_Text"><text:s text:c="4"/>arguments = json.loads(tool_call["function"]["arguments"])</text:span></text:p>
        <text:p text:style-name="Preformatted_20_Text"><text:span text:style-name="Source_20_Text"><text:s text:c="4"/>tool_call_id = tool_call["id"]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result = call_tool(function, arguments)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# Добавляем результаты по одному (ВНУТРИ ЦИКЛА)</text:span></text:p>
        <text:p text:style-name="Preformatted_20_Text"><text:span text:style-name="Source_20_Text"><text:s text:c="4"/>messages.append({</text:span></text:p>
        <text:p text:style-name="Preformatted_20_Text"><text:span text:style-name="Source_20_Text"><text:s text:c="8"/>"role": "tool", </text:span></text:p>
        <text:p text:style-name="Preformatted_20_Text"><text:span text:style-name="Source_20_Text"><text:s text:c="8"/>"tool_call_id": tool_call_id, </text:span></text:p>
        <text:p text:style-name="Preformatted_20_Text"><text:span text:style-name="Source_20_Text"><text:s text:c="8"/>"content": result</text:span></text:p>
        <text:p text:style-name="P1"><text:span text:style-name="Source_20_Text"><text:s text:c="4"/>})</text:span></text:p>
      </text:section>
      <text:p text:style-name="Text_20_body"><text:span text:style-name="Strong_20_Emphasis">Резюме:</text:span> Ваше знание того, какие ключи и роли (role, tool_call_id, tool_calls) нужно отправлять — абсолютно правильное (идеальное по стандарту)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Добавление поддержки <text:span text:style-name="Strong_20_Emphasis">MCP (Model Context Protocol)</text:span> — это <text:span text:style-name="Strong_20_Emphasis">не сложно концептуально</text:span>, но потребует небольшого изменения архитектуры вашего кода, так как официальный SDK для MCP в Python использует асинхронность (asyncio).</text:p>
      <text:p text:style-name="Text_20_body">Если вы это сделаете, ваш агент получит "суперсилу": вы сможете подключать базы данных, браузер (Puppeteer), GitHub, Google Drive и сотни других инструментов, <text:span text:style-name="Strong_20_Emphasis">вообще не меняя код агента в будущем</text:span>.</text:p>
      <text:p text:style-name="Text_20_body">Давайте разберем, как это работает и что придется изменить.</text:p>
      <text:p text:style-name="Horizontal_20_Line"/>
      <text:h text:style-name="Heading_20_3" text:outline-level="3">Как MCP изменит ваш код "концептуально"</text:h>
      <text:p text:style-name="Text_20_body">Сейчас у вас инструменты (bash) <text:span text:style-name="Strong_20_Emphasis">зашиты жестко</text:span> (hardcoded): вы сами написали словарь LLM_TOOLS и сами написали функцию run_bash.</text:p>
      <text:p text:style-name="Text_20_body">С MCP архитектура становится динамической (клиент-серверной):</text:p>
      <text:list xml:id="list3977311674" text:style-name="L11">
        <text:list-item>
          <text:p text:style-name="P13">Ваш Python-скрипт становится <text:span text:style-name="Strong_20_Emphasis">MCP-клиентом</text:span>.</text:p>
        </text:list-item>
        <text:list-item>
          <text:p text:style-name="P13">При запуске он подключается к <text:span text:style-name="Strong_20_Emphasis">MCP-серверу</text:span> (например, официальному серверу SQLite от Anthropic).</text:p>
        </text:list-item>
        <text:list-item>
          <text:p text:style-name="P13">Клиент спрашивает сервер: <text:span text:style-name="T1">"Какие инструменты у тебя есть?"</text:span> (Tool Discovery).</text:p>
        </text:list-item>
        <text:list-item>
          <text:p text:style-name="P13">Клиент конвертирует ответ сервера в стандартный список LLM_TOOLS для LLM.</text:p>
        </text:list-item>
        <text:list-item>
          <text:p text:style-name="P13">Если LLM просит вызвать инструмент браузера или БД, клиент пересылает этот запрос MCP-серверу, тот его выполняет и возвращает результат.</text:p>
        </text:list-item>
      </text:list>
      <text:p text:style-name="Horizontal_20_Line"/>
      <text:h text:style-name="Heading_20_3" text:outline-level="3">Что конкретно придется переписать?</text:h>
      <text:p text:style-name="Text_20_body">Вам понадобится установить библиотеку: pip install mcp.<text:line-break/>Вот основные изменения, которые нужно будет внести в ваш код:</text:p>
      <text:h text:style-name="Heading_20_4" text:outline-level="4">1. Переход на asyncio</text:h>
      <text:p text:style-name="Text_20_body">Так как общение с MCP-сервером происходит ассинхронно (обычно через стандартные потоки ввода-вывода stdio или HTTP SSE), ваш agent_loop и все вызовы инструментов должны стать async def.</text:p>
      <text:h text:style-name="Heading_20_4" text:outline-level="4">2. Динамическое получение LLM_TOOLS</text:h>
      <text:p text:style-name="Text_20_body">Вам больше не нужно писать JSON-схемы руками. MCP-сервер отдаст их сам. Вам останется только переложить их в формат OpenAI.</text:p>
      <text:p text:style-name="Text_20_body">Пример того, как это будет выглядеть в коде:</text:p>
      <text:p text:style-name="P17">code Python</text:p>
      <text:section text:style-name="Sect1" text:name="cdk-accordion-child-19">
        <text:p text:style-name="Preformatted_20_Text"><text:span text:style-name="Source_20_Text">import asyncio</text:span></text:p>
        <text:p text:style-name="Preformatted_20_Text"><text:span text:style-name="Source_20_Text">from mcp import ClientSession, StdioServerParameters</text:span></text:p>
        <text:p text:style-name="Preformatted_20_Text"><text:span text:style-name="Source_20_Text">from mcp.client.stdio import stdio_client</text:span></text:p>
        <text:p text:style-name="Preformatted_20_Text"/>
        <text:p text:style-name="Preformatted_20_Text"><text:span text:style-name="Source_20_Text">async def get_mcp_tools(session):</text:span></text:p>
        <text:p text:style-name="Preformatted_20_Text"><text:soft-page-break/><text:span text:style-name="Source_20_Text"><text:s text:c="4"/>"""Спрашиваем MCP сервер о его инструментах и конвертируем для Qwen/OpenAI"""</text:span></text:p>
        <text:p text:style-name="Preformatted_20_Text"><text:span text:style-name="Source_20_Text"><text:s text:c="4"/>mcp_tools_response = await session.list_tools()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llm_tools = []</text:span></text:p>
        <text:p text:style-name="Preformatted_20_Text"><text:span text:style-name="Source_20_Text"><text:s text:c="4"/>for tool in mcp_tools_response.tools:</text:span></text:p>
        <text:p text:style-name="Preformatted_20_Text"><text:span text:style-name="Source_20_Text"><text:s text:c="8"/>llm_tools.append({</text:span></text:p>
        <text:p text:style-name="Preformatted_20_Text"><text:span text:style-name="Source_20_Text"><text:s text:c="12"/>"type": "function",</text:span></text:p>
        <text:p text:style-name="Preformatted_20_Text"><text:span text:style-name="Source_20_Text"><text:s text:c="12"/>"function": {</text:span></text:p>
        <text:p text:style-name="Preformatted_20_Text"><text:span text:style-name="Source_20_Text"><text:s text:c="16"/>"name": tool.name,</text:span></text:p>
        <text:p text:style-name="Preformatted_20_Text"><text:span text:style-name="Source_20_Text"><text:s text:c="16"/>"description": tool.description,</text:span></text:p>
        <text:p text:style-name="Preformatted_20_Text"><text:span text:style-name="Source_20_Text"><text:s text:c="16"/># Схема MCP (inputSchema) идеально совпадает с параметрами OpenAI!</text:span></text:p>
        <text:p text:style-name="Preformatted_20_Text"><text:span text:style-name="Source_20_Text"><text:s text:c="16"/>"parameters": tool.inputSchema 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})</text:span></text:p>
        <text:p text:style-name="P1"><text:span text:style-name="Source_20_Text"><text:s text:c="4"/>return llm_tools</text:span></text:p>
      </text:section>
      <text:h text:style-name="Heading_20_4" text:outline-level="4">3. Вызов инструментов через MCP</text:h>
      <text:p text:style-name="Text_20_body">Вместо локальной функции run_bash, вы будете пересылать запрос на сервер:</text:p>
      <text:p text:style-name="P17">code Python</text:p>
      <text:section text:style-name="Sect1" text:name="cdk-accordion-child-20">
        <text:p text:style-name="Preformatted_20_Text"><text:span text:style-name="Source_20_Text">async def call_mcp_tool(session, name: str, arguments: dict) -&gt; str:</text:span></text:p>
        <text:p text:style-name="Preformatted_20_Text"><text:span text:style-name="Source_20_Text"><text:s text:c="4"/>"""Выполняет инструмент на стороне MCP сервера"""</text:span></text:p>
        <text:p text:style-name="Preformatted_20_Text"><text:span text:style-name="Source_20_Text"><text:s text:c="4"/>try:</text:span></text:p>
        <text:p text:style-name="Preformatted_20_Text"><text:span text:style-name="Source_20_Text"><text:s text:c="8"/># Передаем вызов на сервер</text:span></text:p>
        <text:p text:style-name="Preformatted_20_Text"><text:span text:style-name="Source_20_Text"><text:s text:c="8"/>result = await session.call_tool(name, arguments)</text:span></text:p>
        <text:p text:style-name="Preformatted_20_Text"><text:span text:style-name="Source_20_Text"><text:s text:c="8"/></text:span></text:p>
        <text:p text:style-name="Preformatted_20_Text"><text:span text:style-name="Source_20_Text"><text:s text:c="8"/># Результат MCP обычно приходит в виде списка объектов (текст, картинки)</text:span></text:p>
        <text:p text:style-name="Preformatted_20_Text"><text:span text:style-name="Source_20_Text"><text:s text:c="8"/># Собираем это в единую строку для LLM</text:span></text:p>
        <text:p text:style-name="Preformatted_20_Text"><text:span text:style-name="Source_20_Text"><text:s text:c="8"/>output = ""</text:span></text:p>
        <text:p text:style-name="Preformatted_20_Text"><text:span text:style-name="Source_20_Text"><text:s text:c="8"/>for content in result.content:</text:span></text:p>
        <text:p text:style-name="Preformatted_20_Text"><text:span text:style-name="Source_20_Text"><text:s text:c="12"/>if content.type == "text":</text:span></text:p>
        <text:p text:style-name="Preformatted_20_Text"><text:span text:style-name="Source_20_Text"><text:s text:c="16"/>output += content.text + "\n"</text:span></text:p>
        <text:p text:style-name="Preformatted_20_Text"><text:span text:style-name="Source_20_Text"><text:s text:c="8"/>return output.strip()</text:span></text:p>
        <text:p text:style-name="Preformatted_20_Text"><text:span text:style-name="Source_20_Text"><text:s text:c="4"/>except Exception as e:</text:span></text:p>
        <text:p text:style-name="P1"><text:span text:style-name="Source_20_Text"><text:s text:c="8"/>return f"Error calling {name} via MCP: {e}"</text:span></text:p>
      </text:section>
      <text:h text:style-name="Heading_20_4" text:outline-level="4">4. Обертка всего агента</text:h>
      <text:p text:style-name="Text_20_body">Вам нужно будет обернуть запуск агента в сессию подключения к MCP серверу.<text:line-break/>Например, подключим официальный сервер для управления браузером (Puppeteer):</text:p>
      <text:p text:style-name="P17">code Python</text:p>
      <text:section text:style-name="Sect1" text:name="cdk-accordion-child-21">
        <text:p text:style-name="Preformatted_20_Text"><text:span text:style-name="Source_20_Text">async def main():</text:span></text:p>
        <text:p text:style-name="Preformatted_20_Text"><text:span text:style-name="Source_20_Text"><text:s text:c="4"/># Настраиваем запуск MCP сервера (в данном случае NodeJS скрипт)</text:span></text:p>
        <text:p text:style-name="Preformatted_20_Text"><text:span text:style-name="Source_20_Text"><text:s text:c="4"/>server_params = StdioServerParameters(</text:span></text:p>
        <text:p text:style-name="Preformatted_20_Text"><text:span text:style-name="Source_20_Text"><text:s text:c="8"/>command="npx",</text:span></text:p>
        <text:p text:style-name="Preformatted_20_Text"><text:span text:style-name="Source_20_Text"><text:s text:c="8"/>args=["-y", "@modelcontextprotocol/server-puppeteer"]</text:span></text:p>
        <text:p text:style-name="Preformatted_20_Text"><text:span text:style-name="Source_20_Text"><text:s text:c="4"/>)</text:span></text:p>
        <text:p text:style-name="Preformatted_20_Text"/>
        <text:p text:style-name="Preformatted_20_Text"><text:span text:style-name="Source_20_Text"><text:s text:c="4"/># Подключаемся к серверу через stdio</text:span></text:p>
        <text:p text:style-name="Preformatted_20_Text"><text:span text:style-name="Source_20_Text"><text:s text:c="4"/>async with stdio_client(server_params) as (read, write):</text:span></text:p>
        <text:p text:style-name="Preformatted_20_Text"><text:span text:style-name="Source_20_Text"><text:s text:c="8"/>async with ClientSession(read, write) as session:</text:span></text:p>
        <text:p text:style-name="Preformatted_20_Text"><text:span text:style-name="Source_20_Text"><text:s text:c="12"/>await session.initialize()</text:span></text:p>
        <text:p text:style-name="Preformatted_20_Text"><text:span text:style-name="Source_20_Text"><text:s text:c="12"/></text:span></text:p>
        <text:p text:style-name="Preformatted_20_Text"><text:span text:style-name="Source_20_Text"><text:s text:c="12"/># 1. Получаем список инструментов браузера динамически</text:span></text:p>
        <text:p text:style-name="Preformatted_20_Text"><text:span text:style-name="Source_20_Text"><text:s text:c="12"/>llm_tools = await get_mcp_tools(session)</text:span></text:p>
        <text:p text:style-name="Preformatted_20_Text"><text:span text:style-name="Source_20_Text"><text:s text:c="12"/></text:span></text:p>
        <text:p text:style-name="Preformatted_20_Text"><text:span text:style-name="Source_20_Text"><text:s text:c="12"/># 2. Запускаем ваш agent_loop, передавая ему сессию и инструменты</text:span></text:p>
        <text:p text:style-name="Preformatted_20_Text"><text:soft-page-break/><text:span text:style-name="Source_20_Text"><text:s text:c="12"/>await agent_loop("Зайди на google.com и скажи, что там написано", session, llm_tools)</text:span></text:p>
        <text:p text:style-name="Preformatted_20_Text"/>
        <text:p text:style-name="Preformatted_20_Text"><text:span text:style-name="Source_20_Text">if __name__ == "__main__":</text:span></text:p>
        <text:p text:style-name="P1"><text:span text:style-name="Source_20_Text"><text:s text:c="4"/>asyncio.run(main())</text:span></text:p>
      </text:section>
      <text:p text:style-name="Horizontal_20_Line"/>
      <text:h text:style-name="Heading_20_3" text:outline-level="3">Насколько это сломает текущую логику агента?</text:h>
      <text:p text:style-name="Text_20_body">Сама логика (call_llm, правильное добавление messages в историю, роли assistant и tool) <text:span text:style-name="Strong_20_Emphasis">вообще не изменится</text:span>. Протокол OpenAI Tool Calling — это как раз тот мостик, который позволяет LLM понимать инструменты из MCP.</text:p>
      <text:h text:style-name="Heading_20_3" text:outline-level="3">Стоит ли оно того?</text:h>
      <text:p text:style-name="Text_20_body"><text:span text:style-name="Strong_20_Emphasis">Однозначно да.</text:span><text:line-break/>Представьте: вы написали эту обертку один раз.</text:p>
      <text:list xml:id="list593263127" text:style-name="L12">
        <text:list-item>
          <text:p text:style-name="P14">Завтра вам нужна база PostgreSQL. Вы просто меняете в server_params command="npx" на запуск MCP-сервера Postgres. Ваш агент <text:span text:style-name="T1">автоматически</text:span> получает инструменты query_db, list_tables и учится работать с БД.</text:p>
        </text:list-item>
        <text:list-item>
          <text:p text:style-name="P14">Послезавтра вам нужен доступ к GitHub. Вы запускаете GitHub MCP сервер, и агент автоматически получает тулзы create_pull_request, search_repos.</text:p>
        </text:list-item>
      </text:list>
      <text:p text:style-name="Text_20_body">Это превращает вашего минимального "Bash-агента" в универсальную машину, способную взаимодействовать с любой системой в мире, для которой написан MCP-коннектор.</text:p>
      <text:p text:style-name="Text_20_body"/>
      <text:p text:style-name="Text_20_body"><text:span text:style-name="Strong_20_Emphasis">Вы абсолютно правы, и это блестящая архитектурная мысль!</text:span></text:p>
      <text:p text:style-name="Text_20_body">Я, видимо, не совсем точно выразился в предыдущем ответе. Вам <text:span text:style-name="Strong_20_Emphasis">совершенно не нужно</text:span> выносить базовые вещи вроде bash, чтения локальных файлов или питона в MCP-сервер.</text:p>
      <text:p text:style-name="Text_20_body">То, что вы описываете, называется <text:span text:style-name="Strong_20_Emphasis">гибридной архитектурой (Hybrid Tool Calling)</text:span>, и именно так работают серьезные агенты в продакшене. Базовые, критичные для работы инструменты "зашиты" в ядро агента, а MCP используется как система плагинов для расширения функционала.</text:p>
      <text:p text:style-name="Text_20_body">Давайте посмотрим, как легко и красиво объединить ваш текущий встроенный bash и внешние инструменты из MCP.</text:p>
      <text:h text:style-name="Heading_20_3" text:outline-level="3">Как это реализовать: Паттерн "Маршрутизатор" (Router)</text:h>
      <text:p text:style-name="Text_20_body">Вам нужно изменить всего две вещи: объединить списки инструментов (чтобы LLM знала обо всех) и написать функцию-маршрутизатор (которая решает, кто будет выполнять команду).</text:p>
      <text:h text:style-name="Heading_20_4" text:outline-level="4">1. Объединяем списки инструментов</text:h>
      <text:p text:style-name="Text_20_body">У вас остается ваша локальная переменная LLM_TOOLS со схемой bash. Когда вы подключаетесь к MCP, вы просто склеиваете два списка.</text:p>
      <text:p text:style-name="P17"><text:soft-page-break/>code Python</text:p>
      <text:section text:style-name="Sect1" text:name="cdk-accordion-child-24">
        <text:p text:style-name="Preformatted_20_Text"><text:span text:style-name="Source_20_Text">LOCAL_TOOLS = [</text:span></text:p>
        <text:p text:style-name="Preformatted_20_Text"><text:span text:style-name="Source_20_Text"><text:s text:c="4"/># Ваш текущий словарь с описанием bash</text:span></text:p>
        <text:p text:style-name="Preformatted_20_Text"><text:span text:style-name="Source_20_Text"><text:s text:c="4"/>{"type": "function", "function": {"name": "bash", ...}}</text:span></text:p>
        <text:p text:style-name="Preformatted_20_Text"><text:span text:style-name="Source_20_Text">]</text:span></text:p>
        <text:p text:style-name="Preformatted_20_Text"/>
        <text:p text:style-name="Preformatted_20_Text"><text:span text:style-name="Source_20_Text">async def get_all_tools(mcp_session):</text:span></text:p>
        <text:p text:style-name="Preformatted_20_Text"><text:span text:style-name="Source_20_Text"><text:s text:c="4"/># 1. Получаем динамические инструменты из MCP</text:span></text:p>
        <text:p text:style-name="Preformatted_20_Text"><text:span text:style-name="Source_20_Text"><text:s text:c="4"/>mcp_response = await mcp_session.list_tools()</text:span></text:p>
        <text:p text:style-name="Preformatted_20_Text"><text:span text:style-name="Source_20_Text"><text:s text:c="4"/>mcp_tools = [{"type": "function", "function": {"name": t.name, "parameters": t.inputSchema}} </text:span></text:p>
        <text:p text:style-name="Preformatted_20_Text"><text:span text:style-name="Source_20_Text"><text:s text:c="17"/>for t in mcp_response.tools]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# 2. Склеиваем встроенные инструменты и внешние</text:span></text:p>
        <text:p text:style-name="P1"><text:span text:style-name="Source_20_Text"><text:s text:c="4"/>return LOCAL_TOOLS + mcp_tools</text:span></text:p>
      </text:section>
      <text:p text:style-name="Text_20_body">Теперь, когда вы отправите этот объединенный список в LLM, модель будет знать: <text:span text:style-name="T1">"Ага, я могу использовать bash, а могу использовать puppeteer_navigate"</text:span>.</text:p>
      <text:h text:style-name="Heading_20_4" text:outline-level="4">2. Пишем функцию-маршрутизатор (Dispatcher)</text:h>
      <text:p text:style-name="Text_20_body">Когда LLM возвращает tool_call, вам нужно посмотреть на имя функции и решить, выполнить её локально в Python или отправить в MCP.</text:p>
      <text:p text:style-name="P17">code Python</text:p>
      <text:section text:style-name="Sect1" text:name="cdk-accordion-child-25">
        <text:p text:style-name="Preformatted_20_Text"><text:span text:style-name="Source_20_Text">async def route_and_execute_tool(name: str, arguments: dict, mcp_session, mcp_tool_names: list) -&gt; str:</text:span></text:p>
        <text:p text:style-name="Preformatted_20_Text"><text:span text:style-name="Source_20_Text"><text:s text:c="4"/>"""Умный роутер: решает, где выполнить инструмент"""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# 1. Проверяем локальные (встроенные) инструменты</text:span></text:p>
        <text:p text:style-name="Preformatted_20_Text"><text:span text:style-name="Source_20_Text"><text:s text:c="4"/>if name == "bash":</text:span></text:p>
        <text:p text:style-name="Preformatted_20_Text"><text:span text:style-name="Source_20_Text"><text:s text:c="8"/># Выполняем ваш обычный, быстрый синхронный код</text:span></text:p>
        <text:p text:style-name="Preformatted_20_Text"><text:span text:style-name="Source_20_Text"><text:s text:c="8"/>return run_bash(**arguments) </text:span></text:p>
        <text:p text:style-name="Preformatted_20_Text"><text:span text:style-name="Source_20_Text"><text:s text:c="8"/></text:span></text:p>
        <text:p text:style-name="Preformatted_20_Text"><text:span text:style-name="Source_20_Text"><text:s text:c="4"/># 2. Проверяем инструменты MCP-сервера</text:span></text:p>
        <text:p text:style-name="Preformatted_20_Text"><text:span text:style-name="Source_20_Text"><text:s text:c="4"/>elif name in mcp_tool_names:</text:span></text:p>
        <text:p text:style-name="Preformatted_20_Text"><text:span text:style-name="Source_20_Text"><text:s text:c="8"/># Отправляем запрос по сети/каналу в MCP</text:span></text:p>
        <text:p text:style-name="Preformatted_20_Text"><text:span text:style-name="Source_20_Text"><text:s text:c="8"/>try:</text:span></text:p>
        <text:p text:style-name="Preformatted_20_Text"><text:span text:style-name="Source_20_Text"><text:s text:c="12"/>result = await mcp_session.call_tool(name, arguments)</text:span></text:p>
        <text:p text:style-name="Preformatted_20_Text"><text:span text:style-name="Source_20_Text"><text:s text:c="12"/>return "\n".join(c.text for c in result.content if c.type == "text")</text:span></text:p>
        <text:p text:style-name="Preformatted_20_Text"><text:span text:style-name="Source_20_Text"><text:s text:c="8"/>except Exception as e:</text:span></text:p>
        <text:p text:style-name="Preformatted_20_Text"><text:span text:style-name="Source_20_Text"><text:s text:c="12"/>return f"MCP Error: {e}"</text:span></text:p>
        <text:p text:style-name="Preformatted_20_Text"><text:span text:style-name="Source_20_Text"><text:s text:c="12"/></text:span></text:p>
        <text:p text:style-name="Preformatted_20_Text"><text:span text:style-name="Source_20_Text"><text:s text:c="4"/># 3. Защита от галлюцинаций LLM</text:span></text:p>
        <text:p text:style-name="Preformatted_20_Text"><text:span text:style-name="Source_20_Text"><text:s text:c="4"/>else:</text:span></text:p>
        <text:p text:style-name="P1"><text:span text:style-name="Source_20_Text"><text:s text:c="8"/>return f"Error: unknown tool '{name}'"</text:span></text:p>
      </text:section>
      <text:h text:style-name="Heading_20_3" text:outline-level="3">Почему ваш подход лучше (использовать встроенный bash):</text:h>
      <text:list xml:id="list740212901" text:style-name="L13">
        <text:list-item>
          <text:p text:style-name="P15"><text:span text:style-name="Strong_20_Emphasis">Скорость и надежность:</text:span> Вызов локального subprocess.run происходит мгновенно. Не нужно сериализовать данные, гонять их через сокеты или пайпы в другой процесс (как это делает MCP).</text:p>
        </text:list-item>
        <text:list-item>
          <text:p text:style-name="P15"><text:span text:style-name="Strong_20_Emphasis">Безопасность:</text:span> Если вы сломаете подключение к базе данных (упадет MCP сервер), ваш агент всё равно сможет использовать bash, чтобы прочитать логи, перезапустить сервис или починить себя. bash — это его "базовый инстинкт", он всегда должен работать.</text:p>
        </text:list-item>
        <text:list-item>
          <text:p text:style-name="P15"><text:span text:style-name="Strong_20_Emphasis">Меньше зависимостей:</text:span> Для базовых операций вам не нужен NodeJS или сторонние <text:soft-page-break/>бинарники.</text:p>
        </text:list-item>
      </text:list>
      <text:p text:style-name="Text_20_body"><text:span text:style-name="Strong_20_Emphasis">Итого:</text:span><text:line-break/>Ваша интуиция сработала на 100% верно. Ядро агента (Main Loop + Bash + LLM API) остается минималистичным питоновским скриптом, а MCP выступает только в роли динамической "розетки", в которую вы по мере необходимости втыкаете коннектор к Postgres, браузеру или Slack.</text:p>
      <text:p text:style-name="P17"/>
      <text:p text:style-name="Text_20_body"/>
      <text:p text:style-name="Text_20_body">Это <text:span text:style-name="Strong_20_Emphasis">самый правильный и "взрослый" подход</text:span>. Именно так работает, например, десктопное приложение Claude (Claude Desktop). Вы описываете конфигурацию серверов в JSON, а код агента просто читает этот файл при запуске, подключается ко всем серверам и собирает их инструменты.</text:p>
      <text:p text:style-name="Text_20_body">Давайте разберем, как выглядит этот JSON-стандарт и как элегантно научить ваш код его читать.</text:p>
      <text:h text:style-name="Heading_20_3" text:outline-level="3">Шаг 1. Создаем стандартный файл mcp_config.json</text:h>
      <text:p text:style-name="Text_20_body">Формат де-факто выглядит так. В корне есть объект mcpServers, где ключ — это понятное имя сервера, а внутри — команда для запуска (command), аргументы (args) и переменные окружения (env), если нужны.</text:p>
      <text:p text:style-name="Text_20_body">Создайте файл mcp_config.json:</text:p>
      <text:p text:style-name="P17">code JSON</text:p>
      <text:section text:style-name="Sect1" text:name="cdk-accordion-child-28">
        <text:p text:style-name="Preformatted_20_Text"><text:span text:style-name="Source_20_Text">{</text:span></text:p>
        <text:p text:style-name="Preformatted_20_Text"><text:span text:style-name="Source_20_Text"><text:s text:c="2"/>"mcpServers": {</text:span></text:p>
        <text:p text:style-name="Preformatted_20_Text"><text:span text:style-name="Source_20_Text"><text:s text:c="4"/>"sqlite_db": {</text:span></text:p>
        <text:p text:style-name="Preformatted_20_Text"><text:span text:style-name="Source_20_Text"><text:s text:c="6"/>"command": "uvx",</text:span></text:p>
        <text:p text:style-name="Preformatted_20_Text"><text:span text:style-name="Source_20_Text"><text:s text:c="6"/>"args": [</text:span></text:p>
        <text:p text:style-name="Preformatted_20_Text"><text:span text:style-name="Source_20_Text"><text:s text:c="8"/>"mcp-server-sqlite",</text:span></text:p>
        <text:p text:style-name="Preformatted_20_Text"><text:span text:style-name="Source_20_Text"><text:s text:c="8"/>"--db-path",</text:span></text:p>
        <text:p text:style-name="Preformatted_20_Text"><text:span text:style-name="Source_20_Text"><text:s text:c="8"/>"/tmp/test.db"</text:span></text:p>
        <text:p text:style-name="Preformatted_20_Text"><text:span text:style-name="Source_20_Text"><text:s text:c="6"/>]</text:span></text:p>
        <text:p text:style-name="Preformatted_20_Text"><text:span text:style-name="Source_20_Text"><text:s text:c="4"/>},</text:span></text:p>
        <text:p text:style-name="Preformatted_20_Text"><text:span text:style-name="Source_20_Text"><text:s text:c="4"/>"puppeteer": {</text:span></text:p>
        <text:p text:style-name="Preformatted_20_Text"><text:span text:style-name="Source_20_Text"><text:s text:c="6"/>"command": "npx",</text:span></text:p>
        <text:p text:style-name="Preformatted_20_Text"><text:span text:style-name="Source_20_Text"><text:s text:c="6"/>"args": [</text:span></text:p>
        <text:p text:style-name="Preformatted_20_Text"><text:span text:style-name="Source_20_Text"><text:s text:c="8"/>"-y",</text:span></text:p>
        <text:p text:style-name="Preformatted_20_Text"><text:span text:style-name="Source_20_Text"><text:s text:c="8"/>"@modelcontextprotocol/server-puppeteer"</text:span></text:p>
        <text:p text:style-name="Preformatted_20_Text"><text:span text:style-name="Source_20_Text"><text:s text:c="6"/>],</text:span></text:p>
        <text:p text:style-name="Preformatted_20_Text"><text:span text:style-name="Source_20_Text"><text:s text:c="6"/>"env": {</text:span></text:p>
        <text:p text:style-name="Preformatted_20_Text"><text:span text:style-name="Source_20_Text"><text:s text:c="8"/>"PUPPETEER_SKIP_CHROMIUM_DOWNLOAD": "true"</text:span></text:p>
        <text:p text:style-name="Preformatted_20_Text"><text:span text:style-name="Source_20_Text"><text:s text:c="6"/>}</text:span></text:p>
        <text:p text:style-name="Preformatted_20_Text"><text:span text:style-name="Source_20_Text"><text:s text:c="4"/>}</text:span></text:p>
        <text:p text:style-name="Preformatted_20_Text"><text:span text:style-name="Source_20_Text"><text:s text:c="2"/>}</text:span></text:p>
        <text:p text:style-name="P1"><text:span text:style-name="Source_20_Text">}</text:span></text:p>
      </text:section>
      <text:h text:style-name="Heading_20_3" text:outline-level="3">Шаг 2. Читаем JSON и подключаем сервера (Python)</text:h>
      <text:p text:style-name="Text_20_body">Когда у вас несколько серверов, возникает небольшая сложность: вам нужно держать открытыми <text:span text:style-name="Strong_20_Emphasis">сразу несколько соединений</text:span>. В Python для этого идеально подходит contextlib.AsyncExitStack (он позволяет открывать динамическое количество async with).</text:p>
      <text:p text:style-name="Text_20_body"><text:soft-page-break/>Также нам нужно создать <text:span text:style-name="Strong_20_Emphasis">"карту маршрутов"</text:span> (словарь mcp_tool_map), чтобы агент знал: если LLM просит query_db, то запрос надо слать в сессию sqlite_db, а если просит navigate — то в сессию puppeteer.</text:p>
      <text:p text:style-name="Text_20_body">Вот код, который это делает:</text:p>
      <text:p text:style-name="P17">code Python</text:p>
      <text:section text:style-name="Sect1" text:name="cdk-accordion-child-29">
        <text:p text:style-name="Preformatted_20_Text"><text:span text:style-name="Source_20_Text">import json</text:span></text:p>
        <text:p text:style-name="Preformatted_20_Text"><text:span text:style-name="Source_20_Text">import asyncio</text:span></text:p>
        <text:p text:style-name="Preformatted_20_Text"><text:span text:style-name="Source_20_Text">from contextlib import AsyncExitStack</text:span></text:p>
        <text:p text:style-name="Preformatted_20_Text"><text:span text:style-name="Source_20_Text">from mcp import ClientSession, StdioServerParameters</text:span></text:p>
        <text:p text:style-name="Preformatted_20_Text"><text:span text:style-name="Source_20_Text">from mcp.client.stdio import stdio_client</text:span></text:p>
        <text:p text:style-name="Preformatted_20_Text"/>
        <text:p text:style-name="Preformatted_20_Text"><text:span text:style-name="Source_20_Text"># Ваши встроенные тулзы (из предыдущего обсуждения)</text:span></text:p>
        <text:p text:style-name="Preformatted_20_Text"><text:span text:style-name="Source_20_Text">LOCAL_TOOLS = [</text:span></text:p>
        <text:p text:style-name="Preformatted_20_Text"><text:span text:style-name="Source_20_Text"><text:s text:c="4"/>{"type": "function", "function": {"name": "bash", "description": "Execute bash", "parameters": {"type": "object", "properties": {"command": {"type": "string"}}, "required": ["command"]}}}</text:span></text:p>
        <text:p text:style-name="Preformatted_20_Text"><text:span text:style-name="Source_20_Text">]</text:span></text:p>
        <text:p text:style-name="Preformatted_20_Text"/>
        <text:p text:style-name="Preformatted_20_Text"><text:span text:style-name="Source_20_Text">async def load_mcp_servers_from_json(config_path: str):</text:span></text:p>
        <text:p text:style-name="Preformatted_20_Text"><text:span text:style-name="Source_20_Text"><text:s text:c="4"/>"""</text:span></text:p>
        <text:p text:style-name="Preformatted_20_Text"><text:span text:style-name="Source_20_Text"><text:s text:c="4"/>Читает config.json, подключается ко всем серверам и возвращает:</text:span></text:p>
        <text:p text:style-name="Preformatted_20_Text"><text:span text:style-name="Source_20_Text"><text:s text:c="4"/>1. stack - менеджер контекста (чтобы потом закрыть все соединения)</text:span></text:p>
        <text:p text:style-name="Preformatted_20_Text"><text:span text:style-name="Source_20_Text"><text:s text:c="4"/>2. all_tools - объединенный список инструментов (Local + MCP1 + MCP2)</text:span></text:p>
        <text:p text:style-name="Preformatted_20_Text"><text:span text:style-name="Source_20_Text"><text:s text:c="4"/>3. mcp_tool_map - словарь: {имя_инструмента: сессия_сервера}</text:span></text:p>
        <text:p text:style-name="Preformatted_20_Text"><text:span text:style-name="Source_20_Text"><text:s text:c="4"/>"""</text:span></text:p>
        <text:p text:style-name="Preformatted_20_Text"><text:span text:style-name="Source_20_Text"><text:s text:c="4"/>with open(config_path, 'r', encoding='utf-8') as f:</text:span></text:p>
        <text:p text:style-name="Preformatted_20_Text"><text:span text:style-name="Source_20_Text"><text:s text:c="8"/>config = json.load(f)</text:span></text:p>
        <text:p text:style-name="Preformatted_20_Text"/>
        <text:p text:style-name="Preformatted_20_Text"><text:span text:style-name="Source_20_Text"><text:s text:c="4"/>stack = AsyncExitStack()</text:span></text:p>
        <text:p text:style-name="Preformatted_20_Text"><text:span text:style-name="Source_20_Text"><text:s text:c="4"/>mcp_tool_map = {} <text:s/># Карта: какой инструмент какому серверу принадлежит</text:span></text:p>
        <text:p text:style-name="Preformatted_20_Text"><text:span text:style-name="Source_20_Text"><text:s text:c="4"/>all_tools = list(LOCAL_TOOLS) # Начинаем с базового bash</text:span></text:p>
        <text:p text:style-name="Preformatted_20_Text"/>
        <text:p text:style-name="Preformatted_20_Text"><text:span text:style-name="Source_20_Text"><text:s text:c="4"/>servers = config.get("mcpServers", {})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for server_name, server_config in servers.items():</text:span></text:p>
        <text:p text:style-name="Preformatted_20_Text"><text:span text:style-name="Source_20_Text"><text:s text:c="8"/>print(f"🔌 Подключаемся к MCP серверу: {server_name}...")</text:span></text:p>
        <text:p text:style-name="Preformatted_20_Text"><text:span text:style-name="Source_20_Text"><text:s text:c="8"/></text:span></text:p>
        <text:p text:style-name="Preformatted_20_Text"><text:span text:style-name="Source_20_Text"><text:s text:c="8"/># 1. Формируем параметры запуска</text:span></text:p>
        <text:p text:style-name="Preformatted_20_Text"><text:span text:style-name="Source_20_Text"><text:s text:c="8"/>params = StdioServerParameters(</text:span></text:p>
        <text:p text:style-name="Preformatted_20_Text"><text:span text:style-name="Source_20_Text"><text:s text:c="12"/>command=server_config["command"],</text:span></text:p>
        <text:p text:style-name="Preformatted_20_Text"><text:span text:style-name="Source_20_Text"><text:s text:c="12"/>args=server_config.get("args", []),</text:span></text:p>
        <text:p text:style-name="Preformatted_20_Text"><text:span text:style-name="Source_20_Text"><text:s text:c="12"/>env=server_config.get("env")</text:span></text:p>
        <text:p text:style-name="Preformatted_20_Text"><text:span text:style-name="Source_20_Text"><text:s text:c="8"/>)</text:span></text:p>
        <text:p text:style-name="Preformatted_20_Text"><text:span text:style-name="Source_20_Text"><text:s text:c="8"/></text:span></text:p>
        <text:p text:style-name="Preformatted_20_Text"><text:span text:style-name="Source_20_Text"><text:s text:c="8"/>try:</text:span></text:p>
        <text:p text:style-name="Preformatted_20_Text"><text:span text:style-name="Source_20_Text"><text:s text:c="12"/># 2. Открываем соединение</text:span></text:p>
        <text:p text:style-name="Preformatted_20_Text"><text:span text:style-name="Source_20_Text"><text:s text:c="12"/>stdio_transport = await stack.enter_async_context(stdio_client(params))</text:span></text:p>
        <text:p text:style-name="Preformatted_20_Text"><text:span text:style-name="Source_20_Text"><text:s text:c="12"/>read, write = stdio_transport</text:span></text:p>
        <text:p text:style-name="Preformatted_20_Text"><text:span text:style-name="Source_20_Text"><text:s text:c="12"/>session = await stack.enter_async_context(ClientSession(read, write))</text:span></text:p>
        <text:p text:style-name="Preformatted_20_Text"><text:span text:style-name="Source_20_Text"><text:s text:c="12"/>await session.initialize()</text:span></text:p>
        <text:p text:style-name="Preformatted_20_Text"><text:span text:style-name="Source_20_Text"><text:s text:c="12"/></text:span></text:p>
        <text:p text:style-name="Preformatted_20_Text"><text:span text:style-name="Source_20_Text"><text:s text:c="12"/># 3. Запрашиваем инструменты у этого сервера</text:span></text:p>
        <text:p text:style-name="Preformatted_20_Text"><text:span text:style-name="Source_20_Text"><text:s text:c="12"/>response = await session.list_tools()</text:span></text:p>
        <text:p text:style-name="Preformatted_20_Text"><text:span text:style-name="Source_20_Text"><text:s text:c="12"/>for tool in response.tools:</text:span></text:p>
        <text:p text:style-name="Preformatted_20_Text"><text:span text:style-name="Source_20_Text"><text:s text:c="16"/># Добавляем инструмент в общий список для LLM</text:span></text:p>
        <text:p text:style-name="Preformatted_20_Text"><text:span text:style-name="Source_20_Text"><text:s text:c="16"/>all_tools.append({</text:span></text:p>
        <text:p text:style-name="Preformatted_20_Text"><text:span text:style-name="Source_20_Text"><text:s text:c="20"/>"type": "function", </text:span></text:p>
        <text:p text:style-name="Preformatted_20_Text"><text:span text:style-name="Source_20_Text"><text:s text:c="20"/>"function": {"name": tool.name, "description": </text:span><text:soft-page-break/><text:span text:style-name="Source_20_Text">tool.description, "parameters": tool.inputSchema}</text:span></text:p>
        <text:p text:style-name="Preformatted_20_Text"><text:span text:style-name="Source_20_Text"><text:s text:c="16"/>})</text:span></text:p>
        <text:p text:style-name="Preformatted_20_Text"><text:span text:style-name="Source_20_Text"><text:s text:c="16"/># Запоминаем, что этот инструмент нужно слать в эту сессию</text:span></text:p>
        <text:p text:style-name="Preformatted_20_Text"><text:span text:style-name="Source_20_Text"><text:s text:c="16"/>mcp_tool_map[tool.name] = session</text:span></text:p>
        <text:p text:style-name="Preformatted_20_Text"><text:span text:style-name="Source_20_Text"><text:s text:c="16"/></text:span></text:p>
        <text:p text:style-name="Preformatted_20_Text"><text:span text:style-name="Source_20_Text"><text:s text:c="12"/>print(f"✅ {server_name} подключен (инструментов: {len(response.tools)})")</text:span></text:p>
        <text:p text:style-name="Preformatted_20_Text"><text:span text:style-name="Source_20_Text"><text:s text:c="8"/>except Exception as e:</text:span></text:p>
        <text:p text:style-name="Preformatted_20_Text"><text:span text:style-name="Source_20_Text"><text:s text:c="12"/>print(f"❌ Ошибка подключения к {server_name}: {e}")</text:span></text:p>
        <text:p text:style-name="Preformatted_20_Text"/>
        <text:p text:style-name="P1"><text:span text:style-name="Source_20_Text"><text:s text:c="4"/>return stack, all_tools, mcp_tool_map</text:span></text:p>
      </text:section>
      <text:h text:style-name="Heading_20_3" text:outline-level="3">Шаг 3. Обновляем ваш Роутер (Call Tool)</text:h>
      <text:p text:style-name="Text_20_body">Теперь ваша функция call_tool должна стать асинхронной и уметь смотреть в нашу карту маршрутов (mcp_tool_map):</text:p>
      <text:p text:style-name="P17">code Python</text:p>
      <text:section text:style-name="Sect1" text:name="cdk-accordion-child-30">
        <text:p text:style-name="Preformatted_20_Text"><text:span text:style-name="Source_20_Text">async def call_tool_hybrid(name: str, arguments: dict, mcp_tool_map: dict) -&gt; str:</text:span></text:p>
        <text:p text:style-name="Preformatted_20_Text"><text:span text:style-name="Source_20_Text"><text:s text:c="4"/># 1. Сначала проверяем встроенные (хардкод) инструменты</text:span></text:p>
        <text:p text:style-name="Preformatted_20_Text"><text:span text:style-name="Source_20_Text"><text:s text:c="4"/>if name == "bash":</text:span></text:p>
        <text:p text:style-name="Preformatted_20_Text"><text:span text:style-name="Source_20_Text"><text:s text:c="8"/>return run_bash(**arguments) # Ваша старая синхронная функция</text:span></text:p>
        <text:p text:style-name="Preformatted_20_Text"><text:span text:style-name="Source_20_Text"><text:s text:c="8"/></text:span></text:p>
        <text:p text:style-name="Preformatted_20_Text"><text:span text:style-name="Source_20_Text"><text:s text:c="4"/># 2. Проверяем, есть ли этот инструмент в MCP серверах</text:span></text:p>
        <text:p text:style-name="Preformatted_20_Text"><text:span text:style-name="Source_20_Text"><text:s text:c="4"/>elif name in mcp_tool_map:</text:span></text:p>
        <text:p text:style-name="Preformatted_20_Text"><text:span text:style-name="Source_20_Text"><text:s text:c="8"/>session = mcp_tool_map[name] # Находим нужную сессию</text:span></text:p>
        <text:p text:style-name="Preformatted_20_Text"><text:span text:style-name="Source_20_Text"><text:s text:c="8"/>try:</text:span></text:p>
        <text:p text:style-name="Preformatted_20_Text"><text:span text:style-name="Source_20_Text"><text:s text:c="12"/>result = await session.call_tool(name, arguments)</text:span></text:p>
        <text:p text:style-name="Preformatted_20_Text"><text:span text:style-name="Source_20_Text"><text:s text:c="12"/># Конвертируем ответ MCP в текст для LLM</text:span></text:p>
        <text:p text:style-name="Preformatted_20_Text"><text:span text:style-name="Source_20_Text"><text:s text:c="12"/>output = "\n".join(c.text for c in result.content if c.type == "text")</text:span></text:p>
        <text:p text:style-name="Preformatted_20_Text"><text:span text:style-name="Source_20_Text"><text:s text:c="12"/>return output</text:span></text:p>
        <text:p text:style-name="Preformatted_20_Text"><text:span text:style-name="Source_20_Text"><text:s text:c="8"/>except Exception as e:</text:span></text:p>
        <text:p text:style-name="Preformatted_20_Text"><text:span text:style-name="Source_20_Text"><text:s text:c="12"/>return f"Error executing MCP tool {name}: {e}"</text:span></text:p>
        <text:p text:style-name="Preformatted_20_Text"><text:span text:style-name="Source_20_Text"><text:s text:c="12"/></text:span></text:p>
        <text:p text:style-name="Preformatted_20_Text"><text:span text:style-name="Source_20_Text"><text:s text:c="4"/># 3. Защита от ошибок</text:span></text:p>
        <text:p text:style-name="Preformatted_20_Text"><text:span text:style-name="Source_20_Text"><text:s text:c="4"/>else:</text:span></text:p>
        <text:p text:style-name="P1"><text:span text:style-name="Source_20_Text"><text:s text:c="8"/>return f"Error: unknown tool '{name}'"</text:span></text:p>
      </text:section>
      <text:h text:style-name="Heading_20_3" text:outline-level="3">Шаг 4. Точка входа агента</text:h>
      <text:p text:style-name="Text_20_body">В самом конце вашего файла вы просто связываете всё это вместе:</text:p>
      <text:p text:style-name="P17">code Python</text:p>
      <text:section text:style-name="Sect1" text:name="cdk-accordion-child-31">
        <text:p text:style-name="Preformatted_20_Text"><text:span text:style-name="Source_20_Text">async def main():</text:span></text:p>
        <text:p text:style-name="Preformatted_20_Text"><text:span text:style-name="Source_20_Text"><text:s text:c="4"/>config_file = "mcp_config.json"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# Загружаем всё из JSON (stack будет держать соединения открытыми)</text:span></text:p>
        <text:p text:style-name="Preformatted_20_Text"><text:span text:style-name="Source_20_Text"><text:s text:c="4"/>stack, tools, tool_map = await load_mcp_servers_from_json(config_file)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try:</text:span></text:p>
        <text:p text:style-name="Preformatted_20_Text"><text:span text:style-name="Source_20_Text"><text:s text:c="8"/># Передаем динамические инструменты и карту маршрутов в ваш цикл агента</text:span></text:p>
        <text:p text:style-name="Preformatted_20_Text"><text:span text:style-name="Source_20_Text"><text:s text:c="8"/>await agent_loop(</text:span></text:p>
        <text:p text:style-name="Preformatted_20_Text"><text:span text:style-name="Source_20_Text"><text:s text:c="12"/>user_message="Посмотри в БД sqlite, какие есть таблицы, а потом сделай ls -la через bash",</text:span></text:p>
        <text:p text:style-name="Preformatted_20_Text"><text:span text:style-name="Source_20_Text"><text:s text:c="12"/>tools=tools,</text:span></text:p>
        <text:p text:style-name="Preformatted_20_Text"><text:span text:style-name="Source_20_Text"><text:s text:c="12"/>mcp_tool_map=tool_map</text:span></text:p>
        <text:p text:style-name="Preformatted_20_Text"><text:span text:style-name="Source_20_Text"><text:s text:c="8"/>)</text:span></text:p>
        <text:p text:style-name="Preformatted_20_Text"><text:span text:style-name="Source_20_Text"><text:s text:c="4"/>finally:</text:span></text:p>
        <text:p text:style-name="Preformatted_20_Text"><text:span text:style-name="Source_20_Text"><text:s text:c="8"/># Корректно закрываем все процессы MCP серверов при выходе</text:span></text:p>
        <text:p text:style-name="Preformatted_20_Text"><text:soft-page-break/><text:span text:style-name="Source_20_Text"><text:s text:c="8"/>await stack.aclose()</text:span></text:p>
        <text:p text:style-name="Preformatted_20_Text"/>
        <text:p text:style-name="Preformatted_20_Text"><text:span text:style-name="Source_20_Text">if __name__ == "__main__":</text:span></text:p>
        <text:p text:style-name="P1"><text:span text:style-name="Source_20_Text"><text:s text:c="4"/>asyncio.run(main())</text:span></text:p>
      </text:section>
      <text:h text:style-name="Heading_20_3" text:outline-level="3">Почему это супер круто?</text:h>
      <text:list xml:id="list1169627582" text:style-name="L14">
        <text:list-item>
          <text:p text:style-name="P16"><text:span text:style-name="Strong_20_Emphasis">Никакого хардкода:</text:span> Вы больше никогда не трогаете код агента при добавлении новых возможностей.</text:p>
        </text:list-item>
        <text:list-item>
          <text:p text:style-name="P16"><text:span text:style-name="Strong_20_Emphasis">Как у взрослых:</text:span> Формат mcp_config.json полностью совпадает со стандартом. Вы можете копипастить настройки серверов из туториалов Anthropic или GitHub прямо в свой файл.</text:p>
        </text:list-item>
        <text:list-item>
          <text:p text:style-name="P16"><text:span text:style-name="Strong_20_Emphasis">Автоматический роутинг:</text:span> Агент сам знает, что bash надо исполнять локально, SQL-запросы отправлять в процесс базы данных, а клики по страницам — в браузер.</text:p>
        </text:list-item>
      </text:list>
      <text:p text:style-name="Text_20_body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7-17T19:53:18.241019671</dc:date>
    <meta:editing-duration>PT3H7M3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5" meta:paragraph-count="454" meta:word-count="3517" meta:character-count="27669" meta:non-whitespace-character-count="22692"/>
  </office:meta>
</office:document-meta>
</file>